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75in"/>
    </style:style>
    <style:style style:name="Table1.B" style:family="table-column">
      <style:table-column-properties style:column-width="1.3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1.3569in"/>
    </style:style>
    <style:style style:name="Table1.E" style:family="table-column">
      <style:table-column-properties style:column-width="0.716in"/>
    </style:style>
    <style:style style:name="Table1.1" style:family="table-row">
      <style:table-row-properties style:min-row-height="1.1875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0pt" fo:font-weight="bold" style:font-size-asian="10pt" style:font-size-complex="10pt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0pt" style:font-size-asian="10pt" style:font-size-complex="10pt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dsumowanie Pracy Zespołu Projektowego</text:h>
      <text:p text:style-name="P6"><text:span text:style-name="T1">Kryptonim projektu:</text:span> SwimSyn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><text:span text:style-name="Strong_20_Emphasis"><text:span text:style-name="T3">Imię i Nazwisko</text:span></text:span></text:p>
            </table:table-cell>
            <table:table-cell table:style-name="Table1.A1" office:value-type="string">
              <text:p text:style-name="P3"><text:span text:style-name="Strong_20_Emphasis"><text:span text:style-name="T3">Rola w projekcie</text:span></text:span></text:p>
            </table:table-cell>
            <table:table-cell table:style-name="Table1.A1" office:value-type="string">
              <text:p text:style-name="P3"><text:span text:style-name="Strong_20_Emphasis"><text:span text:style-name="T3">Główne obszary odpowiedzialności</text:span></text:span></text:p>
            </table:table-cell>
            <table:table-cell table:style-name="Table1.A1" office:value-type="string">
              <text:p text:style-name="P3"><text:span text:style-name="Strong_20_Emphasis"><text:span text:style-name="T3">Procentowe zaangażowanie</text:span></text:span></text:p>
            </table:table-cell>
            <table:table-cell table:style-name="Table1.A1" office:value-type="string">
              <text:p text:style-name="P3"><text:span text:style-name="Strong_20_Emphasis"><text:span text:style-name="T3">Ocena Lidera (0-10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4">Wojciech Osowski</text:p>
          </table:table-cell>
          <table:table-cell table:style-name="Table1.A1" office:value-type="string">
            <text:p text:style-name="P5">Team Leader, Backend Developer</text:p>
          </table:table-cell>
          <table:table-cell table:style-name="Table1.A1" office:value-type="string">
            <text:p text:style-name="P5">Organizacja pracy, implementacja logiki biznesowej w języku Python, utworzenie systemu bazy danych (JSON), tworzenie testów jednostkowych (pytest) i integracyjnych.</text:p>
          </table:table-cell>
          <table:table-cell table:style-name="Table1.A1" office:value-type="string">
            <text:p text:style-name="P4">34%</text:p>
          </table:table-cell>
          <table:table-cell table:style-name="Table1.A1" office:value-type="string">
            <text:p text:style-name="P4">10</text:p>
          </table:table-cell>
        </table:table-row>
        <table:table-row>
          <table:table-cell table:style-name="Table1.A1" office:value-type="string">
            <text:p text:style-name="P4">Emilia Wojtowicz</text:p>
          </table:table-cell>
          <table:table-cell table:style-name="Table1.A1" office:value-type="string">
            <text:p text:style-name="P5">UX/UI Designer, Documentation Manager</text:p>
          </table:table-cell>
          <table:table-cell table:style-name="Table1.A1" office:value-type="string">
            <text:p text:style-name="P5">Projektowanie prototypów UI/UX, przeprowadzenie testów z użytkownikami, zbieranie wymagań (epiki, historyjki), kompilacja i redakcja ostatecznej dokumentacji projektowej.</text:p>
          </table:table-cell>
          <table:table-cell table:style-name="Table1.A1" office:value-type="string">
            <text:p text:style-name="P4">33%</text:p>
          </table:table-cell>
          <table:table-cell table:style-name="Table1.A1" office:value-type="string">
            <text:p text:style-name="P4">10</text:p>
          </table:table-cell>
        </table:table-row>
        <table:table-row>
          <table:table-cell table:style-name="Table1.A1" office:value-type="string">
            <text:p text:style-name="P4">Mateusz Stróżek</text:p>
          </table:table-cell>
          <table:table-cell table:style-name="Table1.A1" office:value-type="string">
            <text:p text:style-name="P5">System Architect, Presenter</text:p>
          </table:table-cell>
          <table:table-cell table:style-name="Table1.A1" office:value-type="string">
            <text:p text:style-name="P5">Tworzenie dokumentacji technicznej i architektonicznej (diagramy klas, diagramy sekwencji UML), weryfikacja przepływów logicznych, opracowanie ostatecznej prezentacji projektu.</text:p>
          </table:table-cell>
          <table:table-cell table:style-name="Table1.A1" office:value-type="string">
            <text:p text:style-name="P4">33%</text:p>
          </table:table-cell>
          <table:table-cell table:style-name="Table1.A1" office:value-type="string">
            <text:p text:style-name="P4">10</text:p>
          </table:table-cell>
        </table:table-row>
      </table:table>
      <text:p text:style-name="P6"><text:span text:style-name="T1">Komentarz Lidera:</text:span> Zespół pracował niezwykle sprawnie i terminowo. Przydzielone zadania były realizowane z dużą starannością, a komunikacja przebiegała bez zakłóceń, co pozwoliło na płynne połączenie fazy analitycznej (wymagania, UI, UML) z fazą deweloperską (kod, testy). Wszyscy członkowie zespołu zasługują na maksymalną ocenę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22:38:55.713442054</meta:creation-date>
    <dc:date>2026-06-15T23:03:14.553761242</dc:date>
    <meta:editing-duration>PT24M18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23" meta:word-count="139" meta:character-count="1168" meta:non-whitespace-character-count="1052"/>
  </office:meta>
</office:document-meta>
</file>