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5">
      <style:text-properties fo:font-weight="bold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52"/>
    <style:style style:name="P19" style:family="paragraph" style:parent-style-name="Text_20_body" style:list-style-name="L53"/>
    <style:style style:name="P20" style:family="paragraph" style:parent-style-name="Text_20_body" style:list-style-name="L54"/>
    <style:style style:name="P21" style:family="paragraph" style:parent-style-name="Text_20_body" style:list-style-name="L55"/>
    <style:style style:name="P22" style:family="paragraph" style:parent-style-name="Text_20_body" style:list-style-name="L56"/>
    <style:style style:name="P23" style:family="paragraph" style:parent-style-name="Text_20_body" style:list-style-name="L57"/>
    <style:style style:name="P24" style:family="paragraph" style:parent-style-name="Text_20_body" style:list-style-name="L58"/>
    <style:style style:name="P25" style:family="paragraph" style:parent-style-name="Text_20_body" style:list-style-name="L59"/>
    <style:style style:name="P26" style:family="paragraph" style:parent-style-name="Text_20_body" style:list-style-name="L60"/>
    <style:style style:name="P27" style:family="paragraph" style:parent-style-name="Text_20_body" style:list-style-name="L61"/>
    <style:style style:name="P28" style:family="paragraph" style:parent-style-name="Text_20_body" style:list-style-name="L62"/>
    <style:style style:name="P29" style:family="paragraph" style:parent-style-name="Text_20_body" style:list-style-name="L63"/>
    <style:style style:name="P30" style:family="paragraph" style:parent-style-name="Text_20_body" style:list-style-name="L64"/>
    <style:style style:name="P31" style:family="paragraph" style:parent-style-name="Text_20_body" style:list-style-name="L65"/>
    <style:style style:name="P32" style:family="paragraph" style:parent-style-name="Text_20_body" style:list-style-name="L66"/>
    <style:style style:name="P33" style:family="paragraph" style:parent-style-name="Text_20_body" style:list-style-name="L67"/>
    <style:style style:name="T1" style:family="text">
      <style:text-properties fo:font-style="italic"/>
    </style:style>
    <style:style style:name="T2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KOMPLETNA DOKUMENTACJA PROJEKTOWA</text:h>
      <text:p text:style-name="Text_20_body"><text:span text:style-name="T2">Pełna nazwa przedsięwzięcia:</text:span> System organizacji szkoły pływania</text:p>
      <text:p text:style-name="Text_20_body"><text:span text:style-name="T2">Nazwa kodowa (kryptonim):</text:span> SwimSync</text:p>
      <text:p text:style-name="Text_20_body"><text:span text:style-name="T2">Skład zespołu:</text:span> * Wojciech Osowski (Lider Zespołu)</text:p>
      <text:list text:style-name="L52">
        <text:list-item>
          <text:p text:style-name="P18">Emilia Wojtowicz</text:p>
        </text:list-item>
        <text:list-item>
          <text:p text:style-name="P18">Mateusz Stróżek</text:p>
        </text:list-item>
      </text:list>
      <text:h text:style-name="Heading_20_2" text:outline-level="2">1. WIZJA I ZAKRES SYSTEMU</text:h>
      <text:p text:style-name="Text_20_body">Planowane jest stworzenie systemu wspierającego organizację zajęć na basenie. System ma ułatwiać zapisy, planowanie grafiku oraz zarządzanie zajęciami z instruktorami i torami basenowymi.</text:p>
      <text:p text:style-name="P2">Kluczowe cele projektu:</text:p>
      <text:list text:style-name="L53">
        <text:list-item>
          <text:p text:style-name="P19">Umożliwienie kursantom samodzielnych zapisów online.</text:p>
        </text:list-item>
        <text:list-item>
          <text:p text:style-name="P19">Optymalizacja obłożenia torów basenowych (zapobieganie konfliktom).</text:p>
        </text:list-item>
        <text:list-item>
          <text:p text:style-name="P19">Dynamiczne zarządzanie dostępnością instruktorów.</text:p>
        </text:list-item>
        <text:list-item>
          <text:p text:style-name="P19">Szybkie informowanie o zmianach (np. odwołanie zajęć).</text:p>
        </text:list-item>
      </text:list>
      <text:p text:style-name="P2">Zakres realizowanych usług:</text:p>
      <text:list text:style-name="L54">
        <text:list-item>
          <text:p text:style-name="P20">Moduł rejestracji i kont użytkowników (klient, instruktor, admin).</text:p>
        </text:list-item>
        <text:list-item>
          <text:p text:style-name="P20">Interaktywny grafik zajęć z podziałem na tory i poziomy zaawansowania.</text:p>
        </text:list-item>
        <text:list-item>
          <text:p text:style-name="P20">System powiadomień e-mail o zmianach w harmonogramie.</text:p>
        </text:list-item>
        <text:list-item>
          <text:p text:style-name="P20">Panel administratora do zarządzania zasobami (basen, kadra).</text:p>
        </text:list-item>
      </text:list>
      <text:p text:style-name="P2">Ograniczenia (czego nie realizujemy):</text:p>
      <text:list text:style-name="L55">
        <text:list-item>
          <text:p text:style-name="P21">Systemu płatności online (w tej wersji płatności odbywają się na miejscu).</text:p>
        </text:list-item>
        <text:list-item>
          <text:p text:style-name="P21">Integracji z systemami bramkowymi na basenie.</text:p>
        </text:list-item>
      </text:list>
      <text:h text:style-name="Heading_20_2" text:outline-level="2">2. ARCHITEKTURA LOGICZNA</text:h>
      <text:p text:style-name="Text_20_body">System będzie działał w środowisku webowym, opierając się na następujących technologiach:</text:p>
      <text:list text:style-name="L56">
        <text:list-item>
          <text:p text:style-name="P22"><text:span text:style-name="T2">Frontend:</text:span> Aplikacja React.js – responsywny interfejs dla użytkowników końcowych i administracji.</text:p>
        </text:list-item>
        <text:list-item>
          <text:p text:style-name="P22"><text:span text:style-name="T2">Backend:</text:span> Python – obsługa walidacji, logiki przydziału torów i harmonogramowania.</text:p>
        </text:list-item>
        <text:list-item>
          <text:p text:style-name="P22"><text:soft-page-break/><text:span text:style-name="T2">Baza Danych:</text:span> MySQL (w fazie prototypowania silnika zastąpiona elastycznym, plikowym systemem JSON) – przechowywanie danych o użytkownikach, zapisach, instruktorach i dostępności torów.</text:p>
        </text:list-item>
        <text:list-item>
          <text:p text:style-name="P22"><text:span text:style-name="T2">Komunikacja:</text:span> Protokół HTTP/HTTPS dla API oraz integracja z zewnętrznym serwerem SMTP dla powiadomień.</text:p>
        </text:list-item>
      </text:list>
      <text:h text:style-name="Heading_20_2" text:outline-level="2">3. GŁÓWNE FUNKCJE (EPIKI I HISTORYJKI)</text:h>
      <text:h text:style-name="Heading_20_3" text:outline-level="3">[EPIKA 1] Zarządzanie kursantami i zapisami</text:h>
      <text:list text:style-name="L57">
        <text:list-item>
          <text:p text:style-name="P23">Jako kursant, chcę zapisać się na zajęcia online, aby zarezerwować miejsce w wybranej grupie.</text:p>
        </text:list-item>
        <text:list-item>
          <text:p text:style-name="P23">Jako kursant, chcę widzieć moje nadchodzące lekcje, aby nie zapomnieć o zajęciach.</text:p>
        </text:list-item>
        <text:list-item>
          <text:p text:style-name="P23">Jako kursant, chcę móc z odpowiednim wyprzedzeniem anulować swoją obecność na zajęciach, aby zwolnić miejsce na torze dla innych.</text:p>
        </text:list-item>
        <text:list-item>
          <text:p text:style-name="P23">Jako kursant, chcę przeglądać swoją historię odbytych zajęć, aby śledzić swoje postępy w uczestnictwie.</text:p>
        </text:list-item>
        <text:list-item>
          <text:p text:style-name="P23">Jako instruktor, chcę po zakończonych zajęciach odznaczyć w grafiku, kto był obecny, aby administrator miał poprawną dokumentację frekwencji.</text:p>
        </text:list-item>
        <text:list-item>
          <text:p text:style-name="P23">Jako instruktor, chcę mieć dostęp do listy imiennej uczestników moich zajęć, aby móc sprawdzić ich obecność.</text:p>
        </text:list-item>
        <text:list-item>
          <text:p text:style-name="P23">Jako kursant, chcę zapisać się na cały cykl zajęć (np. semestr/miesiąc), aby mieć zagwarantowane miejsce bez konieczności odklikiwania rezerwacji co tydzień.</text:p>
        </text:list-item>
      </text:list>
      <text:h text:style-name="Heading_20_3" text:outline-level="3">[EPIKA 2] Zarządzanie kontami i profilami użytkowników</text:h>
      <text:list text:style-name="L58">
        <text:list-item>
          <text:p text:style-name="P24">Jako kursant, chcę założyć i edytować swój profil (w tym wiek i poziom zaawansowania), aby mieć dostęp do grup dopasowanych do moich umiejętności.</text:p>
        </text:list-item>
        <text:list-item>
          <text:p text:style-name="P24">Jako administrator, chcę mieć możliwość przeglądania i edytowania kont użytkowników, aby móc zresetować hasło.</text:p>
        </text:list-item>
        <text:list-item>
          <text:p text:style-name="P24">Jako instruktor, chcę mieć możliwość dodania krótkiego opisu do swojego profilu, aby kursanci wiedzieli o moich kwalifikacjach.</text:p>
        </text:list-item>
      </text:list>
      <text:h text:style-name="Heading_20_3" text:outline-level="3">[EPIKA 3] Komunikacja i powiadomienia</text:h>
      <text:list text:style-name="L59">
        <text:list-item>
          <text:p text:style-name="P25">Jako administrator, chcę wysłać masową wiadomość do grupy, aby poinformować o nagłej awarii basenu itp.</text:p>
        </text:list-item>
        <text:list-item>
          <text:p text:style-name="P25">Jako kursant, chcę otrzymywać przypomnienia o zbliżających się zajęciach, aby zminimalizować ryzyko nieobecności.</text:p>
        </text:list-item>
        <text:list-item>
          <text:p text:style-name="P25">Jako kursant, chcę otrzymywać powiadomienia o zmianach w planie, które mnie dotyczą.</text:p>
        </text:list-item>
        <text:list-item>
          <text:p text:style-name="P25">Jako instruktor, chcę otrzymać automatyczne powiadomienie, gdy administrator dokona zmian w moim grafiku (np. zmieni godzinę lub tor), abym nie pomylił miejsca zajęć.</text:p>
        </text:list-item>
      </text:list>
      <text:h text:style-name="Heading_20_3" text:outline-level="3"><text:soft-page-break/>[EPIKA 4] Zarządzanie zasobami i grafikiem</text:h>
      <text:list text:style-name="L60">
        <text:list-item>
          <text:p text:style-name="P26">Jako instruktor, chcę widzieć swój pełny harmonogram na dany tydzień lub miesiąc, aby odpowiednio zaplanować swój czas pracy i dojazdy na basen.</text:p>
        </text:list-item>
        <text:list-item>
          <text:p text:style-name="P26">Jako instruktor, chcę oznaczyć swoją niedostępność, aby system nie planował mi zajęć w tym czasie.</text:p>
        </text:list-item>
        <text:list-item>
          <text:p text:style-name="P26">Jako administrator, chcę tworzyć nowe grupy pływackie (określając ich maksymalną wielkość, wiek i poziom), aby móc zaplanować nowy semestr nauki.</text:p>
        </text:list-item>
        <text:list-item>
          <text:p text:style-name="P26">Jako administrator, chcę mieć wizualny podgląd zajętości wszystkich torów basenowych w danej godzinie.</text:p>
        </text:list-item>
        <text:list-item>
          <text:p text:style-name="P26">Jako administrator, chcę zdefiniować maksymalną pojemność każdego toru basenowego, aby system zablokował możliwość dołączania nowych osób po przekroczeniu bezpiecznego limitu.</text:p>
        </text:list-item>
        <text:list-item>
          <text:p text:style-name="P26">Jako administrator, chcę, aby system technicznie uniemożliwił mi tworzenie konfliktów (przypisanie dwóch różnych grup do tego samego toru w tej samej godzinie, przypisanie instruktora do zajęć w czasie, gdy prowadzi on już inną grupę).</text:p>
        </text:list-item>
      </text:list>
      <text:h text:style-name="Heading_20_3" text:outline-level="3">[EPIKA 5] Raportowanie i monitorowanie</text:h>
      <text:list text:style-name="L61">
        <text:list-item>
          <text:p text:style-name="P27">Jako administrator, chcę generować zbiorcze zestawienia frekwencji dla konkretnych grup, aby weryfikować, które zajęcia cieszą się największą popularnością.</text:p>
        </text:list-item>
        <text:list-item>
          <text:p text:style-name="P27">Jako administrator, chcę wygenerować listę przepracowanych godzin dla każdego z instruktorów, aby łatwo obliczyć ich comiesięczne wynagrodzenie.</text:p>
        </text:list-item>
      </text:list>
      <text:h text:style-name="Heading_20_2" text:outline-level="2">4. KRYTERIA AKCEPTACJI I SCENARIUSZE TESTOWE</text:h>
      <text:p text:style-name="Text_20_body"><text:span text:style-name="T2">Historyjka 1: Zapisy na zajęcia online</text:span> <text:span text:style-name="T2">Cel:</text:span> Zarezerwowanie miejsca w wybranej grupie przez kursanta. <text:span text:style-name="T2">Warunki wstępne:</text:span> Kursant posiada konto, jest zalogowany, a w systemie istnieją dostępne grupy zajęciowe. <text:span text:style-name="T2">Proces:</text:span> System wyświetla listę dostępnych zajęć. Kursant sprawdza termin, godzinę i poziom grupy, po czym wybiera grupę i zatwierdza zapis. System weryfikuje w tle liczbę wolnych miejsc (z uwzględnieniem limitów grupy i toru). <text:span text:style-name="T2">Warunki końcowe:</text:span> Kursant zostaje zapisany do grupy, miejsce zostaje zarezerwowane, a kursant otrzymuje potwierdzenie zapisu. <text:span text:style-name="T2">Wymagania niefunkcjonalne:</text:span> Operacja zapisu trwa maksymalnie 2 sekundy. System działa poprawnie na urządzeniach mobilnych.</text:p>
      <text:p text:style-name="Text_20_body"><text:span text:style-name="T2">Historyjka 2: Masowa wiadomość do grupy</text:span> <text:span text:style-name="T2">Cel:</text:span> Poinformowanie o nagłej awarii basenu przez administratora. <text:span text:style-name="T2">Warunki wstępne:</text:span> Administrator jest zalogowany. Istnieje grupa docelowa odbiorców. <text:span text:style-name="T2">Proces:</text:span> Administrator wybiera grupę, wpisuje treść wiadomości i wysyła komunikat. <text:span text:style-name="T2">Warunki końcowe:</text:span> Wszyscy członkowie grupy otrzymują wiadomość, a system zapisuje historię wysyłki w bazie. <text:span text:style-name="T2">Wymagania niefunkcjonalne:</text:span> Wiadomość do 500 użytkowników jest wysyłana w czasie poniżej 1 minuty.</text:p>
      <text:p text:style-name="Text_20_body"><text:span text:style-name="T2">Historyjka 3: Przypomnienia o zbliżających się zajęciach</text:span> <text:span text:style-name="T2">Cel:</text:span> Zminimalizowanie ryzyka nieobecności kursanta. <text:span text:style-name="T2">Warunki wstępne:</text:span> Kursant jest aktywnie zapisany na zajęcia odbywające się następnego dnia. <text:span text:style-name="T2">Proces:</text:span> System automatycznie weryfikuje harmonogram i wysyła przypomnienie przed terminem zajęć. <text:span text:style-name="T2">Warunki końcowe:</text:span> Kursant otrzymuje wiadomość e-mail z <text:soft-page-break/>przypomnieniem. <text:span text:style-name="T2">Wymagania niefunkcjonalne:</text:span> Powiadomienie jest wysyłane punktualnie o ustalonej porze przy użyciu zadań cyklicznych (CRON).</text:p>
      <text:h text:style-name="Heading_20_2" text:outline-level="2">5. PROJEKTOWANIE INTERFEJSU I PRZEPŁYWU (UI/UX)</text:h>
      <text:p text:style-name="Text_20_body">Prace projektowe nad interfejsem użytkownika zostały podzielone na dwie iteracje:</text:p>
      <text:p text:style-name="P2">Faza Wstępna (Sprint 2):</text:p>
      <text:list text:style-name="L62">
        <text:list-item>
          <text:p text:style-name="P28">Opracowano projekt flow użytkownika w postaci diagramu aktywności, modelującego ścieżki nawigacyjne po aplikacji.</text:p>
        </text:list-item>
        <text:list-item>
          <text:p text:style-name="P28">Przygotowano wizualizację flow w postaci interaktywnego prototypu interfejsu w wersji Low-Fidelity (makiety szkieletowe).</text:p>
        </text:list-item>
      </text:list>
      <text:p text:style-name="P2">Badania i Finalizacja (Sprint 3):</text:p>
      <text:list text:style-name="L63">
        <text:list-item>
          <text:p text:style-name="P29">Przeprowadzono testy użyteczności prototypu w gronie potencjalnych użytkowników końcowych (kursantów i instruktorów).</text:p>
        </text:list-item>
        <text:list-item>
          <text:p text:style-name="P29">Sporządzono raport z badania interfejsu. Na podstawie zebranego feedbacku wprowadzono niezbędne poprawki w nawigacji oraz układzie formularzy.</text:p>
        </text:list-item>
        <text:list-item>
          <text:p text:style-name="P29">Sfinalizowano ostateczny prototyp UI w wersji High-Fidelity, stanowiący podstawę wizualną dla wdrażanego systemu.</text:p>
        </text:list-item>
      </text:list>
      <text:h text:style-name="Heading_20_2" text:outline-level="2">6. ARCHITEKTURA SYSTEMU I PROJEKT TECHNICZNY (UML)</text:h>
      <text:p text:style-name="Text_20_body">Podczas prac sformalizowano strukturę techniczną aplikacji za pomocą kompleksowej dokumentacji architektonicznej, niezbędnej do implementacji backendu.</text:p>
      <text:p text:style-name="Text_20_body"><text:span text:style-name="T2">Diagramy Sekwencji:</text:span> Zaprojektowano 3 potężne przepływy sekwencyjne dla kluczowych modułów systemu:</text:p>
      <text:list text:style-name="L64">
        <text:list-item>
          <text:p text:style-name="P30">Zarządzanie Użytkownikami, Infrastrukturą i Grupami (obejmujące skomplikowane procesy edycji profili oraz deklaracji niedostępności).</text:p>
        </text:list-item>
        <text:list-item>
          <text:p text:style-name="P30">Obsługa Zapisów i Rezerwacji z aktywną detekcją konfliktów (overbooking) oraz mechanizmem Soft Delete.</text:p>
        </text:list-item>
        <text:list-item>
          <text:p text:style-name="P30">Realizacja Zajęć i Powiadomienia (zbiorcze wprowadzanie obecności, system raportowania, zadania CRON).</text:p>
        </text:list-item>
      </text:list>
      <text:p text:style-name="Text_20_body"><text:span text:style-name="T2">Diagramy Klas:</text:span> W oparciu o przepływy sekwencyjne opracowano 15 szczegółowych diagramów klas. Wprowadzono architektoniczny podział na warstwy zgodnie ze wzorcem MVC:</text:p>
      <text:list text:style-name="L65">
        <text:list-item>
          <text:p text:style-name="P31"><text:span text:style-name="T2">Warstwa </text:span><text:span text:style-name="Source_20_Text"><text:span text:style-name="T2">&lt;&lt;UI&gt;&gt;</text:span></text:span><text:span text:style-name="T2"> / Boundaries:</text:span> Punkty styku użytkownika z aplikacją (np. <text:span text:style-name="Source_20_Text">PortalZapisow</text:span>, <text:span text:style-name="Source_20_Text">SystemCron</text:span>).</text:p>
        </text:list-item>
        <text:list-item>
          <text:p text:style-name="P31"><text:span text:style-name="T2">Warstwa </text:span><text:span text:style-name="Source_20_Text"><text:span text:style-name="T2">&lt;&lt;Control&gt;&gt;</text:span></text:span><text:span text:style-name="T2">:</text:span> Mózg operacyjny weryfikujący reguły biznesowe (np. <text:span text:style-name="Source_20_Text">HarmonogramController</text:span>).</text:p>
        </text:list-item>
        <text:list-item>
          <text:p text:style-name="P31"><text:soft-page-break/><text:span text:style-name="T2">Warstwa </text:span><text:span text:style-name="Source_20_Text"><text:span text:style-name="T2">&lt;&lt;Entity&gt;&gt;</text:span></text:span><text:span text:style-name="T2">:</text:span> Struktury danych i podstawowa logika dziedzinowa (np. <text:span text:style-name="Source_20_Text">GrupaPlywacka</text:span>, <text:span text:style-name="Source_20_Text">Rezerwacja</text:span>).</text:p>
        </text:list-item>
        <text:list-item>
          <text:p text:style-name="P31"><text:span text:style-name="T2">Warstwa </text:span><text:span text:style-name="Source_20_Text"><text:span text:style-name="T2">&lt;&lt;DB&gt;&gt;</text:span></text:span><text:span text:style-name="T2">:</text:span> Moduł persystencji izolujący bazę danych od logiki aplikacji.</text:p>
        </text:list-item>
      </text:list>
      <text:h text:style-name="Heading_20_2" text:outline-level="2">7. IMPLEMENTACJA BACKENDOWA (KOD I TESTY)</text:h>
      <text:p text:style-name="Text_20_body">Zgodnie z planem prac końcowych (Backlog Sprintu 3), w pełni zaimplementowano projekt w języku Python.</text:p>
      <text:h text:style-name="Heading_20_3" text:outline-level="3">7.1. Logika Biznesowa (API Reference)</text:h>
      <text:list text:style-name="L66">
        <text:list-item>
          <text:p text:style-name="P32"><text:span text:style-name="T2">Encje i Serializacja:</text:span> Wdrożono klasy dziedzinowe. Każdy obiekt posiada metody <text:span text:style-name="Source_20_Text">to_dict()</text:span> oraz <text:span text:style-name="Source_20_Text">from_dict()</text:span>, co pozwala na natywną transformację obiektów do formatu JSON bez użycia zewnętrznych bibliotek ORM.</text:p>
        </text:list-item>
        <text:list-item>
          <text:p text:style-name="P32"><text:span text:style-name="T2">Plikowa Baza Danych:</text:span> Zaimplementowano klasę <text:span text:style-name="Source_20_Text">BazaDanych</text:span> obsługującą operacje I/O w automatycznie tworzonym katalogu <text:span text:style-name="Source_20_Text">data/</text:span>. Wdrożono operacje odczytu konfliktów czasowych (parsowanie standardu ISO) oraz masowy zapis obiektów (<text:span text:style-name="Source_20_Text">bulk_insert</text:span>).</text:p>
        </text:list-item>
        <text:list-item>
          <text:p text:style-name="P32"><text:span text:style-name="T2">Kontrolery i Reguły Biznesowe:</text:span> Zaimplementowano kluczowe mechanizmy ujęte w historyjkach użytkownika, m.in.: weryfikację wolnych miejsc, blokowanie możliwości stworzenia konfliktu w harmonogramie przez administratora, czy odrzucanie próby bezpłatnego anulowania lekcji na krócej niż 24 godziny przed jej startem.</text:p>
        </text:list-item>
      </text:list>
      <text:h text:style-name="Heading_20_3" text:outline-level="3">7.2. Testy Jednostkowe i Integracyjne (Pytest)</text:h>
      <text:p text:style-name="Text_20_body">System został zabezpieczony pakietem zautomatyzowanych testów w środowisku <text:span text:style-name="Source_20_Text">pytest</text:span>.</text:p>
      <text:list text:style-name="L67">
        <text:list-item>
          <text:p text:style-name="P33"><text:span text:style-name="T2">Bezpieczeństwo danych:</text:span> Wykorzystano mechanizm wstrzykiwania zależności oraz wbudowaną armaturę <text:span text:style-name="Source_20_Text">tmp_path</text:span>, co gwarantuje, że każdy test tworzy własną, izolowaną bazę danych w katalogu tymczasowym, chroniąc pliki produkcyjne przed modyfikacją.</text:p>
        </text:list-item>
        <text:list-item>
          <text:p text:style-name="P33"><text:span text:style-name="T2">Pokrycie przypadków użycia:</text:span> Przetestowano zachowania optymistyczne (Happy Path) oraz brzegowe (Sad Path). Wykonano asercje weryfikujące m.in. poprawne rzucanie błędów <text:span text:style-name="Source_20_Text">ValueError</text:span> przy próbach zapisu do przepełnionej grupy oraz poprawne generowanie komunikatów ostrzegawczych przechwytywanych na standardowym wyjściu strumieniowym systemu (<text:span text:style-name="Source_20_Text">capsys</text:span>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22:34:08.771307141</meta:creation-date>
    <dc:date>2026-06-15T23:23:43.668259595</dc:date>
    <meta:editing-duration>PT49M3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89" meta:word-count="1318" meta:character-count="10138" meta:non-whitespace-character-count="8961"/>
  </office:meta>
</office:document-meta>
</file>