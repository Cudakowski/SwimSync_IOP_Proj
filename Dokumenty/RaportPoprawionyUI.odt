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Heading_20_3">
      <style:text-properties style:font-name="Liberation Sans"/>
    </style:style>
    <style:style style:name="P3" style:family="paragraph" style:parent-style-name="Heading_20_4">
      <style:text-properties style:font-name="Liberation Sans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Text_20_body" style:list-style-name="L2"/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 style:list-style-name="L1">
      <style:text-properties style:font-name="Liberation Sans"/>
    </style:style>
    <style:style style:name="P8" style:family="paragraph" style:parent-style-name="Text_20_body" style:list-style-name="L3">
      <style:text-properties style:font-name="Liberation Sans"/>
    </style:style>
    <style:style style:name="P9" style:family="paragraph" style:parent-style-name="Text_20_body" style:list-style-name="L4">
      <style:text-properties style:font-name="Liberation Sans"/>
    </style:style>
    <style:style style:name="P10" style:family="paragraph" style:parent-style-name="Text_20_body" style:list-style-name="L5">
      <style:text-properties style:font-name="Liberation Sans"/>
    </style:style>
    <style:style style:name="P11" style:family="paragraph" style:parent-style-name="Text_20_body" style:list-style-name="L6">
      <style:text-properties style:font-name="Liberation Sans"/>
    </style:style>
    <style:style style:name="P12" style:family="paragraph" style:parent-style-name="Text_20_body" style:list-style-name="L7">
      <style:text-properties style:font-name="Liberation Sans"/>
    </style:style>
    <style:style style:name="P13" style:family="paragraph" style:parent-style-name="Text_20_body" style:list-style-name="L8">
      <style:text-properties style:font-name="Liberation Sans"/>
    </style:style>
    <style:style style:name="P14" style:family="paragraph" style:parent-style-name="Text_20_body" style:list-style-name="L9">
      <style:text-properties style:font-name="Liberation Sans"/>
    </style:style>
    <style:style style:name="P15" style:family="paragraph" style:parent-style-name="Text_20_body" style:list-style-name="L10">
      <style:text-properties style:font-name="Liberation Sans"/>
    </style:style>
    <style:style style:name="T1" style:family="text">
      <style:text-properties style:font-name="Liberation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rtefakt: Raport z badania interfejsu w gronie użytkowników</text:h>
      <text:h text:style-name="P2" text:outline-level="3">1. Cel badania</text:h>
      <text:p text:style-name="Text_20_body"><text:span text:style-name="T1">Celem przeprowadzonego badania interfejsu systemu SwimSync było zebranie opinii od trzech kluczowych grup użytkowników systemu: </text:span><text:span text:style-name="Strong_20_Emphasis"><text:span text:style-name="T1">klientów (użytkowników końcowych)</text:span></text:span><text:span text:style-name="T1">, </text:span><text:span text:style-name="Strong_20_Emphasis"><text:span text:style-name="T1">instruktorów</text:span></text:span><text:span text:style-name="T1"> oraz </text:span><text:span text:style-name="Strong_20_Emphasis"><text:span text:style-name="T1">administratorów</text:span></text:span><text:span text:style-name="T1">. Badanie miało na celu ocenę użyteczności prototypu, identyfikację problemów w nawigacji i logice działania systemu oraz zebranie sugestii dotyczących dalszego rozwoju funkcjonalności.</text:span></text:p>
      <text:p text:style-name="P6">Analiza została przeprowadzona w formie testów scenariuszowych, w których uczestnicy wykonywali typowe operacje w systemie, takie jak zapisy na zajęcia, zarządzanie harmonogramem oraz obsługa danych użytkowników.</text:p>
      <text:h text:style-name="P2" text:outline-level="3">2. Metodyka badania</text:h>
      <text:p text:style-name="P6">Badanie miało charakter jakościowy i opierało się na:</text:p>
      <text:list text:style-name="L1">
        <text:list-item>
          <text:p text:style-name="P7">obserwacji użytkowników podczas wykonywania zadań,</text:p>
        </text:list-item>
        <text:list-item>
          <text:p text:style-name="P7">wywiadzie swobodnym po wykonaniu scenariuszy,</text:p>
        </text:list-item>
        <text:list-item>
          <text:p text:style-name="P7">zbieraniu bezpośrednich komentarzy dotyczących interfejsu.</text:p>
        </text:list-item>
      </text:list>
      <text:p text:style-name="P6">Każda grupa użytkowników otrzymała zestaw zadań dopasowany do swojej roli w systemie:</text:p>
      <text:list text:style-name="L2">
        <text:list-item>
          <text:p text:style-name="P5"><text:span text:style-name="Strong_20_Emphasis"><text:span text:style-name="T1">klienci</text:span></text:span><text:span text:style-name="T1"> – zapis na zajęcia, wybór rodzaju uczestnictwa, sprawdzenie kosztów,</text:span></text:p>
        </text:list-item>
        <text:list-item>
          <text:p text:style-name="P5"><text:span text:style-name="Strong_20_Emphasis"><text:span text:style-name="T1">instruktorzy</text:span></text:span><text:span text:style-name="T1"> – przegląd grup, dostęp do harmonogramu zajęć,</text:span></text:p>
        </text:list-item>
        <text:list-item>
          <text:p text:style-name="P5"><text:span text:style-name="Strong_20_Emphasis"><text:span text:style-name="T1">administratorzy</text:span></text:span><text:span text:style-name="T1"> – zarządzanie użytkownikami oraz kontrola płatności.</text:span></text:p>
        </text:list-item>
      </text:list>
      <text:h text:style-name="P2" text:outline-level="3">3. Wyniki badania – opinie użytkowników</text:h>
      <text:h text:style-name="P3" text:outline-level="4">3.1 Opinie klientów (użytkowników końcowych)</text:h>
      <text:p text:style-name="P6">Użytkownicy końcowi systemu wskazali następujące problemy i uwagi:</text:p>
      <text:list text:style-name="L3">
        <text:list-item>
          <text:p text:style-name="P8">trudności w poruszaniu się pomiędzy poszczególnymi widokami aplikacji,</text:p>
        </text:list-item>
        <text:list-item>
          <text:p text:style-name="P8">brak jednoznacznego rozróżnienia pomiędzy zajęciami indywidualnymi a grupowymi,</text:p>
        </text:list-item>
        <text:list-item>
          <text:p text:style-name="P8">niejasny proces zapisu na zajęcia,</text:p>
        </text:list-item>
        <text:list-item>
          <text:p text:style-name="P8">brak informacji o cenie przed finalizacją zapisu,</text:p>
        </text:list-item>
        <text:list-item>
          <text:p text:style-name="P8">brak możliwości wyboru dłuższego uczestnictwa (np. karnety miesięczne).</text:p>
        </text:list-item>
      </text:list>
      <text:p text:style-name="P6">Klienci podkreślali również, że system powinien w większym stopniu przypominać typowe platformy rezerwacyjne, gdzie cały proces zapisu jest szybki i przejrzysty.</text:p>
      <text:h text:style-name="P3" text:outline-level="4"><text:soft-page-break/>3.2 Opinie instruktorów</text:h>
      <text:p text:style-name="P6">Instruktorzy skupili się głównie na kwestiach organizacyjnych i widoczności danych dotyczących zajęć:</text:p>
      <text:list text:style-name="L4">
        <text:list-item>
          <text:p text:style-name="P9">brak jasnego oznaczenia, czy dane zajęcia są indywidualne czy grupowe,</text:p>
        </text:list-item>
        <text:list-item>
          <text:p text:style-name="P9">potrzeba uproszczenia widoku list uczestników.</text:p>
        </text:list-item>
      </text:list>
      <text:p text:style-name="P6">Instruktorzy zwrócili uwagę, że system powinien szybciej umożliwiać dostęp do informacji o zajęciach bez konieczności przechodzenia przez wiele ekranów.</text:p>
      <text:h text:style-name="P3" text:outline-level="4">3.3 Opinie administratorów</text:h>
      <text:p text:style-name="P6">Administratorzy zgłosili uwagi związane z zarządzaniem systemem i kontrolą finansów:</text:p>
      <text:list text:style-name="L5">
        <text:list-item>
          <text:p text:style-name="P10">brak narzędzi do kontroli sald użytkowników,</text:p>
        </text:list-item>
        <text:list-item>
          <text:p text:style-name="P10">brak możliwości ręcznej korekty płatności,</text:p>
        </text:list-item>
        <text:list-item>
          <text:p text:style-name="P10">ograniczony podgląd historii transakcji,</text:p>
        </text:list-item>
        <text:list-item>
          <text:p text:style-name="P10">brak przejrzystego panelu zarządzania użytkownikami,</text:p>
        </text:list-item>
        <text:list-item>
          <text:p text:style-name="P10">zbyt mała liczba funkcji administracyjnych w stosunku do potrzeb systemu.</text:p>
        </text:list-item>
      </text:list>
      <text:p text:style-name="P6">Administratorzy podkreślili konieczność rozbudowy panelu zarządzania, szczególnie w obszarze finansowym.</text:p>
      <text:h text:style-name="P2" text:outline-level="3">4. Wnioski z badania</text:h>
      <text:p text:style-name="P6">Na podstawie zebranych opinii stwierdzono, że główne problemy prototypu systemu SwimSync dotyczą:</text:p>
      <text:list text:style-name="L6">
        <text:list-item>
          <text:p text:style-name="P11">nieintuicyjnej nawigacji,</text:p>
        </text:list-item>
        <text:list-item>
          <text:p text:style-name="P11">braku spójności w procesie zapisów,</text:p>
        </text:list-item>
        <text:list-item>
          <text:p text:style-name="P11">niedostatecznej informacji o kosztach,</text:p>
        </text:list-item>
        <text:list-item>
          <text:p text:style-name="P11">ograniczonej funkcjonalności administracyjnej,</text:p>
        </text:list-item>
        <text:list-item>
          <text:p text:style-name="P11">braku elastyczności w modelu uczestnictwa w zajęciach.</text:p>
        </text:list-item>
      </text:list>
      <text:h text:style-name="P2" text:outline-level="3">5. Wprowadzone zmiany w systemie</text:h>
      <text:p text:style-name="P6">W odpowiedzi na zgłoszone uwagi wprowadzono następujące modyfikacje:</text:p>
      <text:h text:style-name="P3" text:outline-level="4">5.1 Usprawnienie nawigacji</text:h>
      <text:p text:style-name="P6">Dodano stały panel boczny umożliwiający szybkie przechodzenie pomiędzy głównymi sekcjami systemu. Aktualna sekcja jest wizualnie wyróżniona i nieaktywna, co ułatwia orientację w systemie.</text:p>
      <text:h text:style-name="P3" text:outline-level="4">5.2 Ujednolicenie procesu zapisów</text:h>
      <text:p text:style-name="P6">Połączono widoki zajęć grupowych i indywidualnych w jeden spójny moduł. Dodano informację o typie zajęć w tabeli, co zmniejsza redundancję i poprawia czytelność.</text:p>
      <text:h text:style-name="P3" text:outline-level="4"><text:soft-page-break/>5.3 Rozszerzenie modelu zapisów</text:h>
      <text:p text:style-name="P6">Wprowadzono możliwość wyboru:</text:p>
      <text:list text:style-name="L7">
        <text:list-item>
          <text:p text:style-name="P12">pojedynczych zajęć,</text:p>
        </text:list-item>
        <text:list-item>
          <text:p text:style-name="P12">cykli zajęć (karnetów).</text:p>
        </text:list-item>
      </text:list>
      <text:p text:style-name="P6">Dodatkowo użytkownik może wybrać długość karnetu:</text:p>
      <text:list text:style-name="L8">
        <text:list-item>
          <text:p text:style-name="P13">tydzień,</text:p>
        </text:list-item>
        <text:list-item>
          <text:p text:style-name="P13">miesiąc,</text:p>
        </text:list-item>
        <text:list-item>
          <text:p text:style-name="P13">3 miesiące,</text:p>
        </text:list-item>
        <text:list-item>
          <text:p text:style-name="P13">6 miesięcy.</text:p>
        </text:list-item>
      </text:list>
      <text:h text:style-name="P3" text:outline-level="4">5.4 Przejrzystość kosztów</text:h>
      <text:p text:style-name="P6">Dodano dynamiczne wyświetlanie całkowitej ceny przed zatwierdzeniem zapisu, co zwiększa transparentność procesu.</text:p>
      <text:h text:style-name="P3" text:outline-level="4">5.5 Rozbudowa panelu administratora</text:h>
      <text:p text:style-name="P6">Wprowadzono funkcje:</text:p>
      <text:list text:style-name="L9">
        <text:list-item>
          <text:p text:style-name="P14">podglądu sald użytkowników,</text:p>
        </text:list-item>
        <text:list-item>
          <text:p text:style-name="P14">ręcznej korekty wpłat i wypłat,</text:p>
        </text:list-item>
        <text:list-item>
          <text:p text:style-name="P14">rozszerzonego zarządzania finansami systemu.</text:p>
        </text:list-item>
      </text:list>
      <text:h text:style-name="P2" text:outline-level="3">6. Podsumowanie</text:h>
      <text:p text:style-name="P6">Przeprowadzone badanie interfejsu z udziałem klientów, instruktorów oraz administratorów pozwoliło zidentyfikować kluczowe problemy prototypu systemu SwimSync. Zebrane opinie wskazały konieczność poprawy ergonomii, przejrzystości oraz rozszerzenia funkcjonalności systemu.</text:p>
      <text:p text:style-name="P6">Wprowadzone zmiany doprowadziły do:</text:p>
      <text:list text:style-name="L10">
        <text:list-item>
          <text:p text:style-name="P15">usprawnienia nawigacji,</text:p>
        </text:list-item>
        <text:list-item>
          <text:p text:style-name="P15">uproszczenia procesu zapisów,</text:p>
        </text:list-item>
        <text:list-item>
          <text:p text:style-name="P15">zwiększenia przejrzystości kosztów,</text:p>
        </text:list-item>
        <text:list-item>
          <text:p text:style-name="P15">rozszerzenia funkcji administracyjnych,</text:p>
        </text:list-item>
        <text:list-item>
          <text:p text:style-name="P15">lepszego dopasowania systemu do realnych potrzeb użytkowników.</text:p>
        </text:list-item>
      </text:list>
      <text:p text:style-name="P6">Dzięki temu system SwimSync stał się bardziej spójny, intuicyjny oraz zgodny z wymaganiami wszystkich grup użytkowników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14:06:04.868466322</meta:creation-date>
    <dc:date>2026-05-27T14:15:53.046573531</dc:date>
    <meta:editing-duration>PT9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73" meta:word-count="581" meta:character-count="4621" meta:non-whitespace-character-count="4146"/>
  </office:meta>
</office:document-meta>
</file>