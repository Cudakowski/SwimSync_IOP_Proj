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cc8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aport z modyfikacji interfejsu użytkownika – System SwimSync</text:h>
      <text:h text:style-name="P2" text:outline-level="3">1. Wstęp</text:h>
      <text:p text:style-name="P4"><text:span text:style-name="T3">Sa tutaj zapisane wszystkie </text:span>zmiany wprowadzone w interfejsie <text:span text:style-name="T3">prototypu</text:span> systemu <text:span text:style-name="T4">SwimSync </text:span>w odpowiedzi na uwagi zebrane podczas przeglądu projektu. Głównym celem modyfikacji była poprawa nawigacji <text:span text:style-name="T3">oraz </text:span>rozszerzenie funkcjonalności o elementy <text:span text:style-name="T3">uczestnictwa</text:span> i płatności.</text:p>
      <text:h text:style-name="P2" text:outline-level="3">2. Opis wprowadzonych zmian</text:h>
      <text:h text:style-name="P3" text:outline-level="4">A. Optymalizacja nawigacji (Stały pasek menu)</text:h>
      <text:list text:style-name="L1">
        <text:list-item>
          <text:p text:style-name="P5"><text:span text:style-name="T1">Stan poprzedni:</text:span> Menu było realizowane za pomocą przycisków powrotu ("powrót do..."), co zmuszało użytkownika do wielokrotnego klikania, by przejść między odległymi sekcjami systemu.</text:p>
        </text:list-item>
        <text:list-item>
          <text:p text:style-name="P5"><text:bookmark text:name="p-rc_a14dd4daeb2ada07-47"/><text:span text:style-name="T1">Zmiana:</text:span> Wprowadzono <text:span text:style-name="T4">stały panel boczny </text:span>widoczny na większości ekranów (np. Strona główna, Wyloguj, Zarządzaj zajęciami). </text:p>
        </text:list-item>
        <text:list-item>
          <text:p text:style-name="P5"><text:span text:style-name="T1">Użyteczność:</text:span> Przycisk odpowiadający aktualnie wyświetlanej stronie jest nieaktywny, co informuje użytkownika o jego bieżącej lokalizacji w architekturze informacji (zapobieganie zagubieniu się w systemie).</text:p>
        </text:list-item>
      </text:list>
      <text:h text:style-name="P3" text:outline-level="4">B. Ujednolicenie procesu zapisów (Grupy vs. Indywidualne)</text:h>
      <text:list text:style-name="L2">
        <text:list-item>
          <text:p text:style-name="P6"><text:span text:style-name="T1">Stan poprzedni:</text:span> Procesy zapisu na zajęcia grupowe i indywidualne były odseparowane, co dublowało widoki i wprowadzało chaos informacyjny.</text:p>
        </text:list-item>
        <text:list-item>
          <text:p text:style-name="P6"><text:bookmark text:name="p-rc_a14dd4daeb2ada07-48"/><text:span text:style-name="T1">Zmiana:</text:span> Połączono widoki zapisów w jeden spójny moduł. Dodano kolumnę <text:span text:style-name="T4">"Czy indywidualne" </text:span>w tabelach przeglądu grup i uczestnictwa. </text:p>
        </text:list-item>
        <text:list-item>
          <text:p text:style-name="P6"><text:span text:style-name="T1">Zaleta:</text:span> Ujednolicenie bazy danych i interfejsu, co upraszcza ścieżkę użytkownika.</text:p>
        </text:list-item>
      </text:list>
      <text:h text:style-name="P3" text:outline-level="4">C. Rozszerzenie funkcjonalności zapisów (Cykle zajęć)</text:h>
      <text:list text:style-name="L3">
        <text:list-item>
          <text:p text:style-name="P7"><text:span text:style-name="T1">Stan poprzedni:</text:span> Funkcjonalność była niekompletna – brakowało możliwości <text:span text:style-name="T3">konkretnego </text:span>wyboru uczestnictwa długoterminowego <text:span text:style-name="T3">(były jedynie pola do zaznaczenia przy każdej grupie co mogłoby wprowadzać <text:s/>użytkowników w błąd)</text:span>.</text:p>
        </text:list-item>
        <text:list-item>
          <text:p text:style-name="P7"><text:bookmark text:name="p-rc_a14dd4daeb2ada07-49"/><text:span text:style-name="T1">Zmiana:</text:span> Dodano opcję wyboru między <text:span text:style-name="T4">pojedynczymi zajęciami a cyklem zajęć.</text:span> Wprowadzono wybór długości karnetu: Tydzień, Miesiąc, 3 Miesiące lub 6 Miesięcy. </text:p>
        </text:list-item>
        <text:list-item>
          <text:p text:style-name="P7"><text:soft-page-break/><text:span text:style-name="T1">Zaleta:</text:span> System zyskał pełną logikę biznesową wymaganą w obiektach sportowych.</text:p>
        </text:list-item>
      </text:list>
      <text:h text:style-name="P3" text:outline-level="4">D. Przejrzystość finansowa (Wyświetlanie cen)</text:h>
      <text:list text:style-name="L4">
        <text:list-item>
          <text:p text:style-name="P8"><text:span text:style-name="T1">Stan poprzedni:</text:span> Interfejs nie informował użytkownika o kosztach przed finalizacją zapisu.</text:p>
        </text:list-item>
        <text:list-item>
          <text:p text:style-name="P8"><text:bookmark text:name="p-rc_a14dd4daeb2ada07-50"/><text:span text:style-name="T1">Zmiana:</text:span> W widoku potwierdzenia dodano dynamiczne pole <text:span text:style-name="T4">"Łączna cena: XXX zł". </text:span></text:p>
        </text:list-item>
        <text:list-item>
          <text:p text:style-name="P8"><text:span text:style-name="T1">Zaleta:</text:span> Zwiększenie zaufania użytkownika i domknięcie procesu transakcyjnego.</text:p>
        </text:list-item>
      </text:list>
      <text:h text:style-name="P3" text:outline-level="4">E. Rozbudowa panelu Administratora</text:h>
      <text:list text:style-name="L5">
        <text:list-item>
          <text:p text:style-name="P9"><text:span text:style-name="T1">Stan poprzedni:</text:span> Brak narzędzi do nadzoru nad systemem <text:span text:style-name="T3">płatności</text:span>.</text:p>
        </text:list-item>
        <text:list-item>
          <text:p text:style-name="P9"><text:span text:style-name="T1">Zmiana:</text:span> Wprowadzono <text:span text:style-name="T3">p</text:span>odgląd salda użytkownika i możliwość wpłaty/wypłaty w kasie. </text:p>
        </text:list-item>
      </text:list>
      <text:h text:style-name="P2" text:outline-level="3">3. Podsumowanie</text:h>
      <text:p text:style-name="P4">Wprowadzone zmiany pozwoliły na przejście z fazy luźnych widoków do<text:span text:style-name="T4"> spójnego systemu o zamkniętej architekturze. </text:span>System SwimSync jest teraz przygotowany do obsługi trzech ról (Klient, Instruktor, Administrator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2T17:19:50.115592038</meta:creation-date>
    <dc:date>2026-05-22T17:27:08.398868882</dc:date>
    <meta:editing-duration>PT7M18S</meta:editing-duration>
    <meta:editing-cycles>1</meta:editing-cycles>
    <meta:document-statistic meta:table-count="0" meta:image-count="0" meta:object-count="0" meta:page-count="2" meta:paragraph-count="25" meta:word-count="329" meta:character-count="2530" meta:non-whitespace-character-count="2232"/>
    <meta:generator>LibreOffice/24.2.7.2$Linux_X86_64 LibreOffice_project/420$Build-2</meta:generator>
  </office:meta>
</office:document-meta>
</file>