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kumentacja Techniczna Projektu: SwimSync</text:h>
      <text:h text:style-name="Heading_20_2" text:outline-level="2">1. Wprowadzenie</text:h>
      <text:p text:style-name="Text_20_body"><text:span text:style-name="T1">SwimSync</text:span> to system backendowy napisany w języku Python, służący do zarządzania infrastrukturą szkoły pływania. System obsługuje profile użytkowników, rezerwacje zajęć, weryfikację dostępności torów basenowych oraz planowanie harmonogramu instruktorów.</text:p>
      <text:p text:style-name="Text_20_body">Aplikacja nie wykorzystuje zewnętrznych silników bazodanowych (np. SQL) – zamiast tego implementuje własną warstwę persystencji opartą na plikach <text:span text:style-name="T1">JSON</text:span>, co czyni ją niezwykle lekką i łatwą do uruchomienia w każdym środowisku. Architektura opiera się na separacji warstw (Encje -&gt; Baza Danych -&gt; Kontrolery -&gt; Interfejsy).</text:p>
      <text:h text:style-name="Heading_20_2" text:outline-level="2">2. Struktura Projektu</text:h>
      <text:p text:style-name="Text_20_body">Projekt składa się z następujących głównych plików:</text:p>
      <text:list text:style-name="L1">
        <text:list-item>
          <text:p text:style-name="P1"><text:span text:style-name="T1">entities.py</text:span> - Warstwa Domenowa (logika obiektów).</text:p>
        </text:list-item>
        <text:list-item>
          <text:p text:style-name="P1"><text:span text:style-name="T1">database.py</text:span> - Warstwa Persystencji (operacje I/O na plikach JSON).</text:p>
        </text:list-item>
        <text:list-item>
          <text:p text:style-name="P1"><text:span text:style-name="T1">controllers.py</text:span> - Warstwa Logiki Biznesowej (walidacje, przetwarzanie żądań).</text:p>
        </text:list-item>
        <text:list-item>
          <text:p text:style-name="P1"><text:span text:style-name="T1">boundaries.py</text:span> - Warstwa Prezentacji (symulacja interfejsu użytkownika / API).</text:p>
        </text:list-item>
        <text:list-item>
          <text:p text:style-name="P1"><text:span text:style-name="T1">test_swimsync.py</text:span> - Zestaw testów jednostkowych i integracyjnych (pytest).</text:p>
        </text:list-item>
      </text:list>
      <text:h text:style-name="Heading_20_2" text:outline-level="2">3. Opis Modułów i Kodu (API Reference)</text:h>
      <text:h text:style-name="Heading_20_3" text:outline-level="3">3.1. entities.py (Encje)</text:h>
      <text:p text:style-name="Text_20_body">Moduł definiuje struktury danych. Każda klasa posiada metody <text:span text:style-name="Source_20_Text">to_dict()</text:span> oraz <text:span text:style-name="Source_20_Text">from_dict()</text:span> umożliwiające łatwą serializację do formatu JSON.</text:p>
      <text:list text:style-name="L2">
        <text:list-item>
          <text:p text:style-name="P2"><text:span text:style-name="T1">ProfilUzytkownika</text:span>: Przechowuje dane użytkowników. Metoda <text:span text:style-name="Source_20_Text">generate_temp_password()</text:span> generuje 10-znakowy losowy ciąg alfanumeryczny.</text:p>
        </text:list-item>
        <text:list-item>
          <text:p text:style-name="P2"><text:span text:style-name="T1">TorBasenowy</text:span>: Określa zasoby fizyczne basenu. Przechowuje bezwzględny limit pojemności (<text:span text:style-name="Source_20_Text">max_pojemnosc</text:span>).</text:p>
        </text:list-item>
        <text:list-item>
          <text:p text:style-name="P2"><text:span text:style-name="T1">GrupaPlywacka</text:span>: Definiuje parametry grupy. Kluczowa metoda <text:span text:style-name="Source_20_Text">sprawdzWolneMiejsca()</text:span> dynamicznie kalkuluje bezpieczny limit, porównując pojemność toru z maksymalną wielkością grupy.</text:p>
        </text:list-item>
        <text:list-item>
          <text:p text:style-name="P2"><text:span text:style-name="T1">Rezerwacja</text:span>: Przechowuje relację Kursant-Zajęcia. Wdrożono tu mechanizm <text:span text:style-name="T1">Soft Delete</text:span> za pomocą metody <text:span text:style-name="Source_20_Text">zmienStatus()</text:span> (zamiast fizycznie usuwać rezerwację, system oznacza ją jako "anulowana").</text:p>
        </text:list-item>
        <text:list-item>
          <text:p text:style-name="P2"><text:span text:style-name="T1">Obecnosc</text:span>: Reprezentuje status obecności kursanta na konkretnych zajęciach.</text:p>
        </text:list-item>
        <text:list-item>
          <text:p text:style-name="P2"><text:soft-page-break/><text:span text:style-name="T1">Harmonogram</text:span>: Moduł rejestrujący czasowe blokady instruktorów.</text:p>
        </text:list-item>
        <text:list-item>
          <text:p text:style-name="P2"><text:span text:style-name="T1">Raport</text:span>: Klasa agregująca dane w pamięci (np. zliczająca frekwencję lub przepracowane godziny instruktorów) i symulująca generowanie plików (np. PDF).</text:p>
        </text:list-item>
      </text:list>
      <text:h text:style-name="Heading_20_3" text:outline-level="3">3.2. database.py (Baza Danych)</text:h>
      <text:p text:style-name="Text_20_body">Moduł odpowiedzialny za operacje na systemie plików.</text:p>
      <text:list text:style-name="L3">
        <text:list-item>
          <text:p text:style-name="P3"><text:span text:style-name="T1">Zarządzanie Plikami</text:span>: Klasa <text:span text:style-name="Source_20_Text">BazaDanych</text:span> automatycznie tworzy katalog <text:span text:style-name="Source_20_Text">data/</text:span> i inicjalizuje w nim pliki JSON (m.in. uzytkownicy.json, zajecia.json, rezerwacje.json), jeśli te nie istnieją.</text:p>
        </text:list-item>
        <text:list-item>
          <text:p text:style-name="P3"><text:span text:style-name="T1">Operacje I/O</text:span>: Metody <text:span text:style-name="Source_20_Text">_read_file()</text:span> i <text:span text:style-name="Source_20_Text">_write_file()</text:span> odpowiadają za bezpieczny odczyt i zapis danych z odpowiednim kodowaniem UTF-8.</text:p>
        </text:list-item>
        <text:list-item>
          <text:p text:style-name="P3"><text:span text:style-name="T1">CRUD</text:span>: Implementacja metod takich jak <text:span text:style-name="Source_20_Text">save()</text:span>, <text:span text:style-name="Source_20_Text">insert()</text:span> (automatycznie generująca ID w zakresie 1000-9999), oraz specjalistycznych zapytań, np. <text:span text:style-name="Source_20_Text">pobierzNakladajaceSieZajecia()</text:span>, która konwertuje daty z formatu ISO i wyszukuje konflikty w czasie.</text:p>
        </text:list-item>
        <text:list-item>
          <text:p text:style-name="P3"><text:span text:style-name="T1">Bulk Insert</text:span>: Metoda <text:span text:style-name="Source_20_Text">bulk_insert()</text:span> pozwala na zrzut wielu obiektów (np. list obecności) do pliku w ramach jednego zapisu, co optymalizuje wydajność systemu.</text:p>
        </text:list-item>
      </text:list>
      <text:h text:style-name="Heading_20_3" text:outline-level="3">3.3. controllers.py (Logika Biznesowa)</text:h>
      <text:p text:style-name="Text_20_body">Serce aplikacji decydujące o przepływie danych. Zwraca wyjątki (<text:span text:style-name="Source_20_Text">ValueError</text:span>, <text:span text:style-name="Source_20_Text">UserWarning</text:span>) w przypadku złamania reguł biznesowych.</text:p>
      <text:list text:style-name="L4">
        <text:list-item>
          <text:p text:style-name="P4"><text:span text:style-name="T1">ZarzadzanieController</text:span>: Waliduje m.in. zmianę wielkości torów. Metoda <text:span text:style-name="Source_20_Text">_sprawdzWielkoscGrup()</text:span> zapobiega zmniejszeniu toru poniżej liczby już zapisanych na nim osób.</text:p>
        </text:list-item>
        <text:list-item>
          <text:p text:style-name="P4"><text:span text:style-name="T1">RezerwacjeController</text:span>:</text:p>
          <text:list>
            <text:list-item>
              <text:p text:style-name="P4"><text:span text:style-name="Source_20_Text">procesujZapis()</text:span> weryfikuje wolne miejsca w grupie.</text:p>
            </text:list-item>
            <text:list-item>
              <text:p text:style-name="P4"><text:span text:style-name="Source_20_Text">procesujAnulowanie()</text:span> wylicza różnicę czasu. Zezwala na bezkosztowe anulowanie zajęć tylko w przypadku wyprzedzenia wynoszącego co najmniej <text:span text:style-name="T1">24 godziny</text:span>.</text:p>
            </text:list-item>
          </text:list>
        </text:list-item>
        <text:list-item>
          <text:p text:style-name="P4"><text:span text:style-name="T1">HarmonogramController</text:span>: <text:span text:style-name="Source_20_Text">sprawdzIZapiszHarmonogram()</text:span> blokuje administratora przed przypisaniem dwóch grup do tego samego toru lub instruktora o tej samej godzinie.</text:p>
        </text:list-item>
        <text:list-item>
          <text:p text:style-name="P4"><text:span text:style-name="T1">ObecnoscController</text:span>: Wykorzystuje matematyczne <text:span text:style-name="T1">operacje na zbiorach (set)</text:span> do błyskawicznego wyliczenia listy osób nieobecnych na podstawie różnicy zapisanych kursantów i dostarczonej listy osób obecnych.</text:p>
        </text:list-item>
        <text:list-item>
          <text:p text:style-name="P4"><text:span text:style-name="T1">PowiadomieniaController</text:span>: Posiada funkcje rozsyłania alertów o zmianach w grafiku oraz przypomnień (np. <text:span text:style-name="Source_20_Text">cronJob_sprawdzHarmonogram()</text:span>).</text:p>
        </text:list-item>
      </text:list>
      <text:h text:style-name="Heading_20_3" text:outline-level="3"><text:soft-page-break/>3.4. boundaries.py (Warstwa Interfejsu)</text:h>
      <text:p text:style-name="Text_20_body">Stanowi punkt wejściowy do aplikacji. Kontroluje komunikację z użytkownikiem (w tym środowisku – poprzez zrzut na konsolę za pomocą funkcji <text:span text:style-name="Source_20_Text">print()</text:span>).</text:p>
      <text:list text:style-name="L5">
        <text:list-item>
          <text:p text:style-name="P5">Przechwytuje wyjątki (np. <text:span text:style-name="Source_20_Text">try ... except ValueError as e:</text:span>) wyrzucane przez kontrolery.</text:p>
        </text:list-item>
        <text:list-item>
          <text:p text:style-name="P5">Symuluje wyświetlanie popupów, błędów formularzy oraz okien pobierania przeglądarki. Zawiera klasy <text:span text:style-name="Source_20_Text">InterfejsWebowy</text:span>, <text:span text:style-name="Source_20_Text">PortalZapisow</text:span>, <text:span text:style-name="Source_20_Text">SystemAplikacja</text:span> oraz <text:span text:style-name="Source_20_Text">SystemCron</text:span>.</text:p>
        </text:list-item>
      </text:list>
      <text:h text:style-name="Heading_20_2" text:outline-level="2">4. Środowisko Testowe i Testy Automatyczne</text:h>
      <text:p text:style-name="Text_20_body">System został objęty szczegółowymi testami za pomocą frameworka <text:span text:style-name="T1">pytest</text:span>. Plik <text:span text:style-name="Source_20_Text">test_swimsync.py</text:span> zawiera asercje dla wszystkich warstw architektury.</text:p>
      <text:h text:style-name="Heading_20_3" text:outline-level="3">4.1. Architektura Testów i Fixtures</text:h>
      <text:p text:style-name="Text_20_body">Aby chronić prawdziwe dane produkcyjne (katalog <text:span text:style-name="Source_20_Text">data/</text:span>), środowisko testowe wykorzystuje mechanizm tymczasowych, odizolowanych katalogów.</text:p>
      <text:list text:style-name="L6">
        <text:list-item>
          <text:p text:style-name="P6"><text:span text:style-name="T1">temp_db(tmp_path)</text:span>: Wstrzykuje wirtualny katalog operacyjny. Dzięki temu testy operują na plikach tworzonych i niszczonych w locie.</text:p>
        </text:list-item>
        <text:list-item>
          <text:p text:style-name="P6"><text:span text:style-name="T1">controllers(temp_db)</text:span>: Automatycznie instancjonuje wszystkie kontrolery, wiążąc je z tymczasową bazą danych, przygotowując pełne środowisko dla każdego testu.</text:p>
        </text:list-item>
      </text:list>
      <text:h text:style-name="Heading_20_3" text:outline-level="3">4.2. Przeprowadzone Scenariusze Testowe</text:h>
      <text:list text:style-name="L7">
        <text:list-item>
          <text:p text:style-name="P7"><text:span text:style-name="T1">Testy Logiki Domenowej (TestEntities)</text:span>: Weryfikacja kalkulacji miejsc w grupach (<text:span text:style-name="Source_20_Text">sprawdzWolneMiejsca</text:span>), generowania haseł, zmian statusów oraz agregacji wyników do raportów.</text:p>
        </text:list-item>
        <text:list-item>
          <text:p text:style-name="P7"><text:span text:style-name="T1">Testy Bazy Danych (TestDatabase)</text:span>: Sprawdzanie fizycznego tworzenia plików, weryfikacja poprawności serializacji i operacji <text:span text:style-name="Source_20_Text">bulk_insert</text:span>.</text:p>
        </text:list-item>
        <text:list-item>
          <text:p text:style-name="P7"><text:span text:style-name="T1">Testy Logiki Biznesowej (TestZarzadzanieController, TestRezerwacjeController, TestHarmonogramController)</text:span>:</text:p>
          <text:list>
            <text:list-item>
              <text:p text:style-name="P7">Pomyślne rejestrowanie działań (Happy Path).</text:p>
            </text:list-item>
            <text:list-item>
              <text:p text:style-name="P7">Wyłapywanie <text:span text:style-name="Source_20_Text">ValueError</text:span> przy próbach: zapisu do pełnej grupy, tworzenia konfliktów na torach w harmonogramie, spóźnionego anulowania zajęć (poniżej 24h).</text:p>
            </text:list-item>
            <text:list-item>
              <text:p text:style-name="P7">Wyłapywanie alertów (<text:span text:style-name="Source_20_Text">UserWarning</text:span>) przy nakładaniu się urlopu instruktora z jego przypisanymi zajęciami.</text:p>
            </text:list-item>
          </text:list>
        </text:list-item>
        <text:list-item>
          <text:p text:style-name="P7"><text:span text:style-name="T1">Testy Prezentacji (TestBoundaries)</text:span>: Przy użyciu wbudowanego w pytest mechanizmu <text:span text:style-name="Source_20_Text">capsys</text:span> testy weryfikują, czy odpowiednie komunikaty wędrują do standardowego wyjścia konsoli (<text:span text:style-name="Source_20_Text">stdout</text:span>) jako odpowiedź dla użytkownik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5T11:43:09.116288766</meta:creation-date>
    <dc:date>2026-06-15T23:52:03.636566926</dc:date>
    <meta:editing-duration>PT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4" meta:word-count="731" meta:character-count="6033" meta:non-whitespace-character-count="5388"/>
  </office:meta>
</office:document-meta>
</file>